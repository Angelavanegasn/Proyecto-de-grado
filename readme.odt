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2C000001CCFB0FCC4F.png" manifest:media-type="image/png"/>
  <manifest:file-entry manifest:full-path="Pictures/10000001000003C9000000673F025A8B.png" manifest:media-type="image/png"/>
  <manifest:file-entry manifest:full-path="Pictures/10000001000003C4000001A5577A5FA3.png" manifest:media-type="image/png"/>
  <manifest:file-entry manifest:full-path="Pictures/10000001000003C100000047F7001078.png" manifest:media-type="image/png"/>
  <manifest:file-entry manifest:full-path="Pictures/100000010000028C000002172DF4272A.png" manifest:media-type="image/png"/>
  <manifest:file-entry manifest:full-path="Pictures/1000000100000136000001FD7E7376B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aa8" officeooo:paragraph-rsid="001c1aa8"/>
    </style:style>
    <style:style style:name="P2" style:family="paragraph" style:parent-style-name="Standard">
      <style:text-properties officeooo:rsid="001ce2b2" officeooo:paragraph-rsid="001ce2b2"/>
    </style:style>
    <style:style style:name="P3" style:family="paragraph" style:parent-style-name="Standard">
      <style:text-properties style:text-underline-style="solid" style:text-underline-width="auto" style:text-underline-color="font-color" officeooo:rsid="001ce2b2" officeooo:paragraph-rsid="001ce2b2"/>
    </style:style>
    <style:style style:name="P4" style:family="paragraph" style:parent-style-name="Standard">
      <style:text-properties style:text-underline-style="none" officeooo:rsid="001ce2b2" officeooo:paragraph-rsid="001ce2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ón para detectar desastres naturales en colombia</text:p>
      <text:p text:style-name="P1"/>
      <text:p text:style-name="P1">En la primera imagen se muestra el nombre de la aplicación, la fecha actual y la cantidad de alertas que se han tenido en el día.</text:p>
      <text:p text:style-name="P1"><draw:frame draw:style-name="fr1" draw:name="Imagen1" text:anchor-type="char" svg:width="17.59cm" svg:height="1.868cm" draw:z-index="0"><draw:image xlink:href="Pictures/10000001000003C9000000673F025A8B.png" xlink:type="simple" xlink:show="embed" xlink:actuate="onLoad" draw:mime-type="image/png"/></draw:frame></text:p>
      <text:p text:style-name="P1">También indica que el monitoreo en tiempo real es de 24/7,la cantidad de regiones que están siendo monitoreadas , la cantidad de personas alertadas,la cantidad de tragedias evitadas, precisión del sistema.</text:p>
      <text:p text:style-name="P1"><draw:frame draw:style-name="fr1" draw:name="Imagen2" text:anchor-type="char" svg:width="17.59cm" svg:height="7.682cm" draw:z-index="1"><draw:image xlink:href="Pictures/10000001000003C4000001A5577A5FA3.png" xlink:type="simple" xlink:show="embed" xlink:actuate="onLoad" draw:mime-type="image/png"/></draw:frame></text:p>
      <text:p text:style-name="P1"/>
      <text:p text:style-name="P1">Tenemos tres módulos que son Mapa de alertas , alertas activas y estadísticas.</text:p>
      <text:p text:style-name="P1"/>
      <text:p text:style-name="P1"><draw:frame draw:style-name="fr1" draw:name="Imagen3" text:anchor-type="char" svg:width="17.59cm" svg:height="1.298cm" draw:z-index="2"><draw:image xlink:href="Pictures/10000001000003C100000047F7001078.png" xlink:type="simple" xlink:show="embed" xlink:actuate="onLoad" draw:mime-type="image/png"/></draw:frame></text:p>
      <text:p text:style-name="P1"/>
      <text:p text:style-name="P1">Mapa de alertas</text:p>
      <text:p text:style-name="P1">Contiene como un figura en donde muestra los puntos de alertas que hay en las regiones.</text:p>
      <text:p text:style-name="P1">El color rojo es critico,naranja alto, amarillo medio,azul bajo y verde seguro.</text:p>
      <text:p text:style-name="P1"/>
      <text:p text:style-name="P1"><draw:frame draw:style-name="fr2" draw:name="Imagen4" text:anchor-type="char" svg:width="17.59cm" svg:height="13.19cm" draw:z-index="3"><draw:image xlink:href="Pictures/100000010000028C000002172DF4272A.png" xlink:type="simple" xlink:show="embed" xlink:actuate="onLoad" draw:mime-type="image/png"/></draw:frame><text:soft-page-break/></text:p>
      <text:p text:style-name="P1"/>
      <text:p text:style-name="P1">También tenemos un sistema de alertas</text:p>
      <text:p text:style-name="P1">el usuario puede seleccionar si desea activar el sistema de alarmas y si desea que la alerta suene o no.</text:p>
      <text:p text:style-name="P2">y también puede generar notificaciones del departamento donde se encuentra si hay un desastre natural para alertas y el estado en el que se encuentra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Imagen5" text:anchor-type="char" svg:width="8.204cm" svg:height="13.469cm" draw:z-index="4"><draw:image xlink:href="Pictures/1000000100000136000001FD7E7376BB.png" xlink:type="simple" xlink:show="embed" xlink:actuate="onLoad" draw:mime-type="image/png"/></draw:frame><draw:frame draw:style-name="fr3" draw:name="Imagen6" text:anchor-type="char" svg:width="7.938cm" svg:height="12.173cm" draw:z-index="5"><draw:image xlink:href="Pictures/100000010000012C000001CCFB0FCC4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2:30:31.402420600</meta:creation-date>
    <dc:date>2026-05-01T12:55:24.286295400</dc:date>
    <meta:editing-duration>PT3M1S</meta:editing-duration>
    <meta:editing-cycles>1</meta:editing-cycles>
    <meta:document-statistic meta:table-count="0" meta:image-count="6" meta:object-count="0" meta:page-count="3" meta:paragraph-count="10" meta:word-count="159" meta:character-count="940" meta:non-whitespace-character-count="791"/>
    <meta:generator>LibreOffice/26.2.2.2$Windows_X86_64 LibreOffice_project/1f77d10d6938fd34972958f64b2bcfa54f8b1ba5</meta:generator>
  </office:meta>
</office:document-meta>
</file>